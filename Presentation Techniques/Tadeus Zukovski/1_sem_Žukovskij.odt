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style>
    <style:style style:name="T6" style:parent-style-name="DefaultParagraphFont" style:family="text">
      <style:text-properties fo:color="#000000"/>
    </style:style>
    <style:style style:name="P7"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8" style:parent-style-name="DefaultParagraphFont" style:family="text">
      <style:text-properties style:font-name="Aptos" style:font-name-asian="Times New Roman" fo:language="en" fo:country="US"/>
    </style:style>
    <style:style style:name="P9"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0" style:parent-style-name="DefaultParagraphFont" style:family="text">
      <style:text-properties style:font-name="Aptos" style:font-name-asian="Times New Roman" fo:language="en" fo:country="US"/>
    </style:style>
    <style:style style:name="P11"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2" style:parent-style-name="DefaultParagraphFont" style:family="text">
      <style:text-properties style:font-name="Aptos" style:font-name-asian="Times New Roman" fo:language="en" fo:country="US"/>
    </style:style>
    <style:style style:name="P13"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4" style:parent-style-name="DefaultParagraphFont" style:family="text">
      <style:text-properties style:font-name="Aptos" style:font-name-asian="Times New Roman" fo:language="en" fo:country="US"/>
    </style:style>
    <style:style style:name="P15"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6" style:parent-style-name="DefaultParagraphFont" style:family="text">
      <style:text-properties style:font-name="Aptos" style:font-name-asian="Times New Roman" fo:language="en" fo:country="US"/>
    </style:style>
    <style:style style:name="P17"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18" style:parent-style-name="DefaultParagraphFont" style:family="text">
      <style:text-properties style:font-name="Aptos" style:font-name-asian="Times New Roman" fo:language="en" fo:country="US"/>
    </style:style>
    <style:style style:name="P19"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20" style:parent-style-name="DefaultParagraphFont" style:family="text">
      <style:text-properties style:font-name="Aptos" style:font-name-asian="Times New Roman" fo:language="en" fo:country="US"/>
    </style:style>
    <style:style style:name="P21"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22" style:parent-style-name="DefaultParagraphFont" style:family="text">
      <style:text-properties style:font-name="Aptos" style:font-name-asian="Times New Roman" fo:language="en" fo:country="US"/>
    </style:style>
    <style:style style:name="P23"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24" style:parent-style-name="DefaultParagraphFont" style:family="text">
      <style:text-properties style:font-name="Aptos" style:font-name-asian="Times New Roman" fo:language="en" fo:country="US"/>
    </style:style>
    <style:style style:name="P25"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26" style:parent-style-name="DefaultParagraphFont" style:family="text">
      <style:text-properties style:font-name="Aptos" style:font-name-asian="Times New Roman" fo:language="en" fo:country="US"/>
    </style:style>
    <style:style style:name="P27"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28" style:parent-style-name="DefaultParagraphFont" style:family="text">
      <style:text-properties style:font-name="Aptos" style:font-name-asian="Times New Roman" fo:language="en" fo:country="US"/>
    </style:style>
    <style:style style:name="P29"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30" style:parent-style-name="DefaultParagraphFont" style:family="text">
      <style:text-properties style:font-name="Aptos" style:font-name-asian="Times New Roman" fo:language="en" fo:country="US"/>
    </style:style>
    <style:style style:name="T31" style:parent-style-name="DefaultParagraphFont" style:family="text">
      <style:text-properties fo:font-weight="bold" style:font-weight-asian="bold" style:font-weight-complex="bold"/>
    </style:style>
    <style:style style:name="P32" style:parent-style-name="Normal" style:family="paragraph">
      <style:paragraph-properties fo:text-align="center"/>
    </style:style>
    <style:style style:name="P33" style:parent-style-name="TableofFigures" style:family="paragraph">
      <style:paragraph-properties>
        <style:tab-stops>
          <style:tab-stop style:type="right" style:leader-style="dotted" style:leader-text="." style:position="6.1597in"/>
        </style:tab-stops>
      </style:paragraph-properties>
    </style:style>
    <style:style style:name="P34" style:parent-style-name="TableofFigures" style:family="paragraph">
      <style:paragraph-properties>
        <style:tab-stops>
          <style:tab-stop style:type="right" style:leader-style="dotted" style:leader-text="." style:position="6.1597in"/>
        </style:tab-stops>
      </style:paragraph-properties>
    </style:style>
    <style:style style:name="T35" style:parent-style-name="Hyperlink" style:family="text">
      <style:text-properties fo:language="en" fo:country="US"/>
    </style:style>
    <style:style style:name="T36" style:parent-style-name="DefaultParagraphFont" style:family="text">
      <style:text-properties fo:language="en" fo:country="US"/>
    </style:style>
    <style:style style:name="P37" style:parent-style-name="TableofFigures" style:family="paragraph">
      <style:paragraph-properties>
        <style:tab-stops>
          <style:tab-stop style:type="right" style:leader-style="dotted" style:leader-text="." style:position="6.1597in"/>
        </style:tab-stops>
      </style:paragraph-properties>
    </style:style>
    <style:style style:name="T38" style:parent-style-name="Hyperlink" style:family="text">
      <style:text-properties fo:language="en" fo:country="US"/>
    </style:style>
    <style:style style:name="T39" style:parent-style-name="DefaultParagraphFont" style:family="text">
      <style:text-properties fo:language="en" fo:country="US"/>
    </style:style>
    <style:style style:name="P40" style:parent-style-name="Normal" style:family="paragraph">
      <style:text-properties fo:language="en" fo:country="US"/>
    </style:style>
    <style:style style:name="P41" style:parent-style-name="Normal" style:family="paragraph">
      <style:text-properties fo:font-weight="bold" style:font-weight-asian="bold" style:font-weight-complex="bold" fo:language="en" fo:country="US"/>
    </style:style>
    <style:style style:name="P42" style:parent-style-name="TableofFigures" style:family="paragraph">
      <style:paragraph-properties>
        <style:tab-stops>
          <style:tab-stop style:type="right" style:leader-style="dotted" style:leader-text="." style:position="6.1597in"/>
        </style:tab-stops>
      </style:paragraph-properties>
    </style:style>
    <style:style style:name="T43" style:parent-style-name="Hyperlink" style:family="text">
      <style:text-properties fo:language="en" fo:country="US"/>
    </style:style>
    <style:style style:name="T44" style:parent-style-name="Hyperlink" style:family="text">
      <style:text-properties fo:language="en" fo:country="US"/>
    </style:style>
    <style:style style:name="T45" style:parent-style-name="Hyperlink"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Normal" style:family="paragraph">
      <style:text-properties fo:language="en" fo:country="US"/>
    </style:style>
    <style:style style:name="P49" style:parent-style-name="Text" style:family="paragraph">
      <style:paragraph-properties fo:text-indent="0in"/>
    </style:style>
    <style:style style:name="P50" style:parent-style-name="Normal" style:family="paragraph">
      <style:paragraph-properties fo:break-before="page"/>
      <style:text-properties fo:language="en" fo:country="US"/>
    </style:style>
    <style:style style:name="P51" style:parent-style-name="First" style:family="paragraph">
      <style:paragraph-properties fo:margin-left="1.002in" fo:text-indent="-0.6083in">
        <style:tab-stops/>
      </style:paragraph-properties>
    </style:style>
    <style:style style:name="T52" style:parent-style-name="DefaultParagraphFont" style:family="text">
      <style:text-properties fo:language="pl" fo:country="PL"/>
    </style:style>
    <style:style style:name="T53" style:parent-style-name="DefaultParagraphFont" style:family="text">
      <style:text-properties fo:language="pl" fo:country="PL"/>
    </style:style>
    <style:style style:name="P54" style:parent-style-name="Text" style:family="paragraph">
      <style:text-properties fo:language="pl" fo:country="PL"/>
    </style:style>
    <style:style style:name="P55" style:parent-style-name="Table" style:family="paragraph">
      <style:paragraph-properties fo:text-align="center"/>
    </style:style>
    <style:style style:name="TableColumn57" style:family="table-column">
      <style:table-column-properties style:column-width="1.9604in"/>
    </style:style>
    <style:style style:name="TableColumn58" style:family="table-column">
      <style:table-column-properties style:column-width="0.4833in"/>
    </style:style>
    <style:style style:name="TableColumn59" style:family="table-column">
      <style:table-column-properties style:column-width="0.4833in"/>
    </style:style>
    <style:style style:name="TableColumn60" style:family="table-column">
      <style:table-column-properties style:column-width="0.4833in"/>
    </style:style>
    <style:style style:name="Table56" style:family="table">
      <style:table-properties style:width="3.4104in" fo:margin-left="0in" table:align="center"/>
    </style:style>
    <style:style style:name="TableRow61" style:family="table-row">
      <style:table-row-properties/>
    </style:style>
    <style:style style:name="TableCell62" style:family="table-cell">
      <style:table-cell-properties fo:border-top="0.0069in solid #FFFFFF" fo:border-left="0.0069in solid #FFFFFF" fo:border-bottom="0.0069in solid #FFFFFF" fo:border-right="none" fo:background-color="#E97132" style:writing-mode="lr-tb" fo:padding-top="0in" fo:padding-left="0.075in" fo:padding-bottom="0in" fo:padding-right="0.075in">
        <style:background-fill draw:fill="solid" draw:fill-color="#E97132"/>
      </style:table-cell-properties>
    </style:style>
    <style:style style:name="P63" style:parent-style-name="Text" style:family="paragraph">
      <style:paragraph-properties fo:text-align="start" style:line-height-at-least="0.2361in" fo:text-indent="0in"/>
      <style:text-properties fo:font-weight="bold" style:font-weight-asian="bold" style:font-weight-complex="bold" fo:color="#000000"/>
    </style:style>
    <style:style style:name="TableCell64" style:family="table-cell">
      <style:table-cell-properties fo:border-top="0.0069in solid #FFFFFF" fo:border-left="none" fo:border-bottom="0.0069in solid #FFFFFF" fo:border-right="none" fo:background-color="#E97132" style:writing-mode="lr-tb" fo:padding-top="0in" fo:padding-left="0.075in" fo:padding-bottom="0in" fo:padding-right="0.075in">
        <style:background-fill draw:fill="solid" draw:fill-color="#E97132"/>
      </style:table-cell-properties>
    </style:style>
    <style:style style:name="P65" style:parent-style-name="Text" style:family="paragraph">
      <style:paragraph-properties fo:text-align="start" style:line-height-at-least="0.2361in" fo:text-indent="0in"/>
      <style:text-properties fo:font-weight="bold" style:font-weight-asian="bold" style:font-weight-complex="bold" fo:color="#000000"/>
    </style:style>
    <style:style style:name="TableCell66" style:family="table-cell">
      <style:table-cell-properties fo:border-top="0.0069in solid #FFFFFF" fo:border-left="none" fo:border-bottom="0.0069in solid #FFFFFF" fo:border-right="none" fo:background-color="#E97132" style:writing-mode="lr-tb" fo:padding-top="0in" fo:padding-left="0.075in" fo:padding-bottom="0in" fo:padding-right="0.075in">
        <style:background-fill draw:fill="solid" draw:fill-color="#E97132"/>
      </style:table-cell-properties>
    </style:style>
    <style:style style:name="P67" style:parent-style-name="Text" style:family="paragraph">
      <style:paragraph-properties fo:text-align="start" style:line-height-at-least="0.2361in" fo:text-indent="0in"/>
      <style:text-properties fo:font-weight="bold" style:font-weight-asian="bold" style:font-weight-complex="bold" fo:color="#000000"/>
    </style:style>
    <style:style style:name="TableCell68" style:family="table-cell">
      <style:table-cell-properties fo:border-top="0.0069in solid #FFFFFF" fo:border-left="none" fo:border-bottom="0.0069in solid #FFFFFF" fo:border-right="0.0069in solid #FFFFFF" fo:background-color="#E97132" style:writing-mode="lr-tb" fo:padding-top="0in" fo:padding-left="0.075in" fo:padding-bottom="0in" fo:padding-right="0.075in">
        <style:background-fill draw:fill="solid" draw:fill-color="#E97132"/>
      </style:table-cell-properties>
    </style:style>
    <style:style style:name="P69" style:parent-style-name="Text" style:family="paragraph">
      <style:paragraph-properties fo:text-align="start" style:line-height-at-least="0.2361in" fo:text-indent="0in"/>
      <style:text-properties fo:font-weight="bold" style:font-weight-asian="bold" style:font-weight-complex="bold" fo:color="#000000"/>
    </style:style>
    <style:style style:name="TableRow70" style:family="table-row">
      <style:table-row-properties/>
    </style:style>
    <style:style style:name="TableCell71"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72" style:parent-style-name="Text" style:family="paragraph">
      <style:paragraph-properties fo:text-align="start" style:line-height-at-least="0.2361in" fo:text-indent="0in"/>
      <style:text-properties fo:font-weight="bold" style:font-weight-asian="bold" style:font-weight-complex="bold" fo:color="#000000"/>
    </style:style>
    <style:style style:name="TableCell73"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74" style:parent-style-name="Text" style:family="paragraph">
      <style:paragraph-properties fo:text-align="start" style:line-height-at-least="0.2361in" fo:text-indent="0in"/>
      <style:text-properties fo:color="#000000"/>
    </style:style>
    <style:style style:name="TableCell75"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76" style:parent-style-name="Text" style:family="paragraph">
      <style:paragraph-properties fo:text-align="start" style:line-height-at-least="0.2361in" fo:text-indent="0in"/>
      <style:text-properties fo:color="#000000"/>
    </style:style>
    <style:style style:name="TableCell77"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78" style:parent-style-name="Text" style:family="paragraph">
      <style:paragraph-properties fo:text-align="start" style:line-height-at-least="0.2361in" fo:text-indent="0in"/>
      <style:text-properties fo:color="#000000"/>
    </style:style>
    <style:style style:name="TableRow79" style:family="table-row">
      <style:table-row-properties/>
    </style:style>
    <style:style style:name="TableCell80"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81" style:parent-style-name="Text" style:family="paragraph">
      <style:paragraph-properties fo:text-align="start" style:line-height-at-least="0.2361in" fo:text-indent="0in"/>
      <style:text-properties fo:font-weight="bold" style:font-weight-asian="bold" style:font-weight-complex="bold" fo:color="#000000"/>
    </style:style>
    <style:style style:name="TableCell82"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83" style:parent-style-name="Text" style:family="paragraph">
      <style:paragraph-properties fo:text-align="start" style:line-height-at-least="0.2361in" fo:text-indent="0in"/>
      <style:text-properties fo:color="#000000"/>
    </style:style>
    <style:style style:name="TableCell84"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85" style:parent-style-name="Text" style:family="paragraph">
      <style:paragraph-properties fo:text-align="start" style:line-height-at-least="0.2361in" fo:text-indent="0in"/>
      <style:text-properties fo:color="#000000"/>
    </style:style>
    <style:style style:name="TableCell86"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87" style:parent-style-name="Text" style:family="paragraph">
      <style:paragraph-properties fo:text-align="start" style:line-height-at-least="0.2361in" fo:text-indent="0in"/>
      <style:text-properties fo:color="#000000"/>
    </style:style>
    <style:style style:name="TableRow88" style:family="table-row">
      <style:table-row-properties/>
    </style:style>
    <style:style style:name="TableCell89"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90" style:parent-style-name="Text" style:family="paragraph">
      <style:paragraph-properties fo:text-align="start" style:line-height-at-least="0.2361in" fo:text-indent="0in"/>
      <style:text-properties fo:font-weight="bold" style:font-weight-asian="bold" style:font-weight-complex="bold" fo:color="#000000"/>
    </style:style>
    <style:style style:name="TableCell91"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92" style:parent-style-name="Text" style:family="paragraph">
      <style:paragraph-properties fo:text-align="start" style:line-height-at-least="0.2361in" fo:text-indent="0in"/>
      <style:text-properties fo:color="#000000"/>
    </style:style>
    <style:style style:name="TableCell93"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94" style:parent-style-name="Text" style:family="paragraph">
      <style:paragraph-properties fo:text-align="start" style:line-height-at-least="0.2361in" fo:text-indent="0in"/>
      <style:text-properties fo:color="#000000"/>
    </style:style>
    <style:style style:name="TableCell95"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96" style:parent-style-name="Text" style:family="paragraph">
      <style:paragraph-properties fo:text-align="start" style:line-height-at-least="0.2361in" fo:text-indent="0in"/>
      <style:text-properties fo:color="#000000"/>
    </style:style>
    <style:style style:name="TableRow97" style:family="table-row">
      <style:table-row-properties/>
    </style:style>
    <style:style style:name="TableCell98"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99" style:parent-style-name="Text" style:family="paragraph">
      <style:paragraph-properties fo:text-align="start" style:line-height-at-least="0.2361in" fo:text-indent="0in"/>
      <style:text-properties fo:font-weight="bold" style:font-weight-asian="bold" style:font-weight-complex="bold" fo:color="#000000"/>
    </style:style>
    <style:style style:name="TableCell100"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01" style:parent-style-name="Text" style:family="paragraph">
      <style:paragraph-properties fo:text-align="start" style:line-height-at-least="0.2361in" fo:text-indent="0in"/>
      <style:text-properties fo:color="#000000"/>
    </style:style>
    <style:style style:name="TableCell102"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03" style:parent-style-name="Text" style:family="paragraph">
      <style:paragraph-properties fo:text-align="start" style:line-height-at-least="0.2361in" fo:text-indent="0in"/>
      <style:text-properties fo:color="#000000"/>
    </style:style>
    <style:style style:name="TableCell104"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05" style:parent-style-name="Text" style:family="paragraph">
      <style:paragraph-properties fo:text-align="start" style:line-height-at-least="0.2361in" fo:text-indent="0in"/>
      <style:text-properties fo:color="#000000"/>
    </style:style>
    <style:style style:name="TableRow106" style:family="table-row">
      <style:table-row-properties/>
    </style:style>
    <style:style style:name="TableCell107"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108" style:parent-style-name="Text" style:family="paragraph">
      <style:paragraph-properties fo:text-align="start" style:line-height-at-least="0.2361in" fo:text-indent="0in"/>
      <style:text-properties fo:font-weight="bold" style:font-weight-asian="bold" style:font-weight-complex="bold" fo:color="#000000"/>
    </style:style>
    <style:style style:name="TableCell109"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10" style:parent-style-name="Text" style:family="paragraph">
      <style:paragraph-properties fo:text-align="center" style:line-height-at-least="0.2361in" fo:text-indent="0in"/>
      <style:text-properties fo:color="#000000"/>
    </style:style>
    <style:style style:name="TableCell111"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12" style:parent-style-name="Text" style:family="paragraph">
      <style:paragraph-properties fo:text-align="center" style:line-height-at-least="0.2361in" fo:text-indent="0in"/>
      <style:text-properties fo:color="#000000"/>
    </style:style>
    <style:style style:name="TableCell113"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14" style:parent-style-name="Text" style:family="paragraph">
      <style:paragraph-properties fo:text-align="center" style:line-height-at-least="0.2361in" fo:text-indent="0in"/>
      <style:text-properties fo:color="#000000"/>
    </style:style>
    <style:style style:name="TableRow115" style:family="table-row">
      <style:table-row-properties/>
    </style:style>
    <style:style style:name="TableCell116"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117" style:parent-style-name="Text" style:family="paragraph">
      <style:paragraph-properties fo:text-align="start" style:line-height-at-least="0.2361in" fo:text-indent="0in"/>
      <style:text-properties fo:font-weight="bold" style:font-weight-asian="bold" style:font-weight-complex="bold" fo:color="#000000"/>
    </style:style>
    <style:style style:name="TableCell118"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19" style:parent-style-name="Text" style:family="paragraph">
      <style:paragraph-properties fo:text-align="start" style:line-height-at-least="0.2361in" fo:text-indent="0in"/>
      <style:text-properties fo:color="#000000"/>
    </style:style>
    <style:style style:name="TableCell120"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21" style:parent-style-name="Text" style:family="paragraph">
      <style:paragraph-properties fo:text-align="start" style:line-height-at-least="0.2361in" fo:text-indent="0in"/>
      <style:text-properties fo:color="#000000"/>
    </style:style>
    <style:style style:name="TableCell122"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23" style:parent-style-name="Text" style:family="paragraph">
      <style:paragraph-properties fo:text-align="start" style:line-height-at-least="0.2361in" fo:text-indent="0in"/>
      <style:text-properties fo:color="#000000"/>
    </style:style>
    <style:style style:name="TableRow124" style:family="table-row">
      <style:table-row-properties/>
    </style:style>
    <style:style style:name="TableCell125"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126" style:parent-style-name="Text" style:family="paragraph">
      <style:paragraph-properties fo:text-align="start" style:line-height-at-least="0.2361in" fo:text-indent="0in"/>
      <style:text-properties fo:font-weight="bold" style:font-weight-asian="bold" style:font-weight-complex="bold" fo:color="#000000"/>
    </style:style>
    <style:style style:name="TableCell127"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28" style:parent-style-name="Text" style:family="paragraph">
      <style:paragraph-properties fo:text-align="start" style:line-height-at-least="0.2361in" fo:text-indent="0in"/>
      <style:text-properties fo:color="#000000"/>
    </style:style>
    <style:style style:name="TableCell129"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30" style:parent-style-name="Text" style:family="paragraph">
      <style:paragraph-properties fo:text-align="start" style:line-height-at-least="0.2361in" fo:text-indent="0in"/>
      <style:text-properties fo:color="#000000"/>
    </style:style>
    <style:style style:name="TableCell131"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32" style:parent-style-name="Text" style:family="paragraph">
      <style:paragraph-properties fo:text-align="start" style:line-height-at-least="0.2361in" fo:text-indent="0in"/>
      <style:text-properties fo:color="#000000"/>
    </style:style>
    <style:style style:name="TableRow133" style:family="table-row">
      <style:table-row-properties/>
    </style:style>
    <style:style style:name="TableCell134"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135" style:parent-style-name="Text" style:family="paragraph">
      <style:paragraph-properties fo:text-align="start" style:line-height-at-least="0.2361in" fo:text-indent="0in"/>
      <style:text-properties fo:font-weight="bold" style:font-weight-asian="bold" style:font-weight-complex="bold" fo:color="#000000"/>
    </style:style>
    <style:style style:name="TableCell136"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37" style:parent-style-name="Text" style:family="paragraph">
      <style:paragraph-properties fo:text-align="start" style:line-height-at-least="0.2361in" fo:text-indent="0in"/>
      <style:text-properties fo:color="#000000"/>
    </style:style>
    <style:style style:name="TableCell138"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39" style:parent-style-name="Text" style:family="paragraph">
      <style:paragraph-properties fo:text-align="start" style:line-height-at-least="0.2361in" fo:text-indent="0in"/>
      <style:text-properties fo:color="#000000"/>
    </style:style>
    <style:style style:name="TableCell140" style:family="table-cell">
      <style:table-cell-properties fo:border="0.0069in solid #FFFFFF" fo:background-color="#FAE2D5" style:writing-mode="lr-tb" fo:padding-top="0in" fo:padding-left="0.075in" fo:padding-bottom="0in" fo:padding-right="0.075in">
        <style:background-fill draw:fill="solid" draw:fill-color="#FAE2D5"/>
      </style:table-cell-properties>
    </style:style>
    <style:style style:name="P141" style:parent-style-name="Text" style:family="paragraph">
      <style:paragraph-properties fo:text-align="start" style:line-height-at-least="0.2361in" fo:text-indent="0in"/>
      <style:text-properties fo:color="#000000"/>
    </style:style>
    <style:style style:name="TableRow142" style:family="table-row">
      <style:table-row-properties/>
    </style:style>
    <style:style style:name="TableCell143" style:family="table-cell">
      <style:table-cell-properties fo:border="0.0069in solid #FFFFFF" fo:background-color="#E97132" style:writing-mode="lr-tb" fo:padding-top="0in" fo:padding-left="0.075in" fo:padding-bottom="0in" fo:padding-right="0.075in">
        <style:background-fill draw:fill="solid" draw:fill-color="#E97132"/>
      </style:table-cell-properties>
    </style:style>
    <style:style style:name="P144" style:parent-style-name="Text" style:family="paragraph">
      <style:paragraph-properties fo:text-align="start" style:line-height-at-least="0.2361in" fo:text-indent="0in"/>
      <style:text-properties fo:font-weight="bold" style:font-weight-asian="bold" style:font-weight-complex="bold" fo:color="#000000"/>
    </style:style>
    <style:style style:name="TableCell145"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46" style:parent-style-name="Text" style:family="paragraph">
      <style:paragraph-properties fo:text-align="start" style:line-height-at-least="0.2361in" fo:text-indent="0in"/>
      <style:text-properties fo:color="#000000"/>
    </style:style>
    <style:style style:name="TableCell147"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48" style:parent-style-name="Text" style:family="paragraph">
      <style:paragraph-properties fo:text-align="start" style:line-height-at-least="0.2361in" fo:text-indent="0in"/>
      <style:text-properties fo:color="#000000"/>
    </style:style>
    <style:style style:name="TableCell149" style:family="table-cell">
      <style:table-cell-properties fo:border="0.0069in solid #FFFFFF" fo:background-color="#F6C5AC" style:writing-mode="lr-tb" fo:padding-top="0in" fo:padding-left="0.075in" fo:padding-bottom="0in" fo:padding-right="0.075in">
        <style:background-fill draw:fill="solid" draw:fill-color="#F6C5AC"/>
      </style:table-cell-properties>
    </style:style>
    <style:style style:name="P150" style:parent-style-name="Text" style:family="paragraph">
      <style:paragraph-properties fo:text-align="start" style:line-height-at-least="0.2361in" fo:text-indent="0in"/>
      <style:text-properties fo:color="#000000"/>
    </style:style>
    <style:style style:name="P151" style:parent-style-name="Normal" style:family="paragraph">
      <style:text-properties fo:hyphenate="true"/>
    </style:style>
    <style:style style:name="S1" style:family="section">
      <style:section-properties fo:margin-left="0in" fo:margin-right="0in" style:writing-mode="lr-tb">
        <style:columns fo:column-count="2" fo:column-gap="0.3152in"/>
      </style:section-properties>
    </style:style>
    <style:style style:name="P152" style:parent-style-name="Text" style:family="paragraph">
      <style:text-properties fo:language="pl" fo:country="PL"/>
    </style:style>
    <style:style style:name="T153" style:parent-style-name="DefaultParagraphFont" style:family="text">
      <style:text-properties fo:language="pl" fo:country="PL"/>
    </style:style>
    <style:style style:name="T154" style:parent-style-name="FootnoteReference" style:family="text">
      <style:text-properties fo:language="pl" fo:country="PL"/>
    </style:style>
    <style:style style:name="T155" style:parent-style-name="DefaultParagraphFont" style:family="text">
      <style:text-properties fo:language="pl" fo:country="PL"/>
    </style:style>
    <style:style style:name="T156" style:parent-style-name="DefaultParagraphFont" style:family="text">
      <style:text-properties fo:language="pl" fo:country="PL"/>
    </style:style>
    <style:style style:name="T157" style:parent-style-name="DefaultParagraphFont" style:family="text">
      <style:text-properties fo:language="pl" fo:country="PL"/>
    </style:style>
    <style:style style:name="P158" style:parent-style-name="Text" style:family="paragraph">
      <style:text-properties fo:language="pl" fo:country="PL"/>
    </style:style>
    <style:style style:name="S2" style:family="section">
      <style:section-properties fo:margin-left="0in" fo:margin-right="0in" style:writing-mode="lr-tb"/>
    </style:style>
    <style:style style:name="P159" style:parent-style-name="Normal" style:family="paragraph">
      <style:text-properties fo:font-size="1pt" style:font-size-asian="1pt" style:font-size-complex="1pt"/>
    </style:style>
    <style:style style:name="P160" style:parent-style-name="IndexHeading" style:family="paragraph">
      <style:paragraph-properties fo:keep-with-next="always">
        <style:tab-stops>
          <style:tab-stop style:type="right" style:position="2.993in"/>
        </style:tab-stops>
      </style:paragraph-properties>
    </style:style>
    <style:style style:name="T161" style:parent-style-name="DefaultParagraphFont" style:family="text">
      <style:text-properties fo:language="lt" fo:country="LT"/>
    </style:style>
    <style:style style:name="P162" style:parent-style-name="Index1" style:family="paragraph">
      <style:paragraph-properties>
        <style:tab-stops>
          <style:tab-stop style:type="right" style:position="2.8263in"/>
        </style:tab-stops>
      </style:paragraph-properties>
      <style:text-properties fo:language="lt" fo:country="LT"/>
    </style:style>
    <style:style style:name="P163" style:parent-style-name="IndexHeading" style:family="paragraph">
      <style:paragraph-properties fo:keep-with-next="always">
        <style:tab-stops>
          <style:tab-stop style:type="right" style:position="2.993in"/>
        </style:tab-stops>
      </style:paragraph-properties>
    </style:style>
    <style:style style:name="T164" style:parent-style-name="DefaultParagraphFont" style:family="text">
      <style:text-properties fo:language="lt" fo:country="LT"/>
    </style:style>
    <style:style style:name="P165" style:parent-style-name="Index1" style:family="paragraph">
      <style:paragraph-properties>
        <style:tab-stops>
          <style:tab-stop style:type="right" style:position="2.8263in"/>
        </style:tab-stops>
      </style:paragraph-properties>
      <style:text-properties fo:language="lt" fo:country="LT"/>
    </style:style>
    <style:style style:name="P166" style:parent-style-name="IndexHeading" style:family="paragraph">
      <style:paragraph-properties fo:keep-with-next="always">
        <style:tab-stops>
          <style:tab-stop style:type="right" style:position="2.993in"/>
        </style:tab-stops>
      </style:paragraph-properties>
    </style:style>
    <style:style style:name="T167" style:parent-style-name="DefaultParagraphFont" style:family="text">
      <style:text-properties fo:language="lt" fo:country="LT"/>
    </style:style>
    <style:style style:name="P168" style:parent-style-name="Index1" style:family="paragraph">
      <style:paragraph-properties>
        <style:tab-stops>
          <style:tab-stop style:type="right" style:position="2.8263in"/>
        </style:tab-stops>
      </style:paragraph-properties>
      <style:text-properties fo:language="lt" fo:country="LT"/>
    </style:style>
    <style:style style:name="P169" style:parent-style-name="Literature" style:family="paragraph">
      <style:paragraph-properties fo:margin-left="0.4958in" fo:text-indent="-0.2479in">
        <style:tab-stops/>
      </style:paragraph-properties>
    </style:style>
    <style:style style:family="graphic" style:name="a10" style:parent-style-name="Graphics">
      <style:graphic-properties fo:border="0.01042in none" fo:background-color="transparent" style:wrap="parallel" style:wrap-contour="false" style:horizontal-rel="page-content" style:vertical-rel="page" style:horizontal-pos="righ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KOMPIUTERINIAI VIRUSAI</text:p>
      <text:p text:style-name="TOCHeading"><text:span text:style-name="T6">Turiny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224220399" office:target-frame-name="_top" xlink:show="replace"><text:span text:style-name="Hyperlink">1.</text:span><text:span text:style-name="T8"><text:tab/></text:span><text:span text:style-name="Hyperlink">Įvadas</text:span><text:tab/>2</text:a></text:p>
          <text:p text:style-name="P9"><text:a xlink:href="#_Toc224220400" office:target-frame-name="_top" xlink:show="replace"><text:span text:style-name="Hyperlink">2.</text:span><text:span text:style-name="T10"><text:tab/></text:span><text:span text:style-name="Hyperlink">Kompiuterinių virusų samprata</text:span><text:tab/>2</text:a></text:p>
          <text:p text:style-name="P11"><text:a xlink:href="#_Toc224220401" office:target-frame-name="_top" xlink:show="replace"><text:span text:style-name="Hyperlink">3.</text:span><text:span text:style-name="T12"><text:tab/></text:span><text:span text:style-name="Hyperlink">Atsiradimo prielaidos</text:span><text:tab/>3</text:a></text:p>
          <text:p text:style-name="P13"><text:a xlink:href="#_Toc224220402" office:target-frame-name="_top" xlink:show="replace"><text:span text:style-name="Hyperlink">4.</text:span><text:span text:style-name="T14"><text:tab/></text:span><text:span text:style-name="Hyperlink">Virusų dauginimasis</text:span><text:tab/>4</text:a></text:p>
          <text:p text:style-name="P15"><text:a xlink:href="#_Toc224220403" office:target-frame-name="_top" xlink:show="replace"><text:span text:style-name="Hyperlink">5.</text:span><text:span text:style-name="T16"><text:tab/></text:span><text:span text:style-name="Hyperlink">Virusų rūšys</text:span><text:tab/>5</text:a></text:p>
          <text:p text:style-name="P17"><text:a xlink:href="#_Toc224220404" office:target-frame-name="_top" xlink:show="replace"><text:span text:style-name="Hyperlink">5.1</text:span><text:span text:style-name="T18"><text:tab/></text:span><text:span text:style-name="Hyperlink">Kirminai</text:span><text:tab/>5</text:a></text:p>
          <text:p text:style-name="P19"><text:a xlink:href="#_Toc224220405" office:target-frame-name="_top" xlink:show="replace"><text:span text:style-name="Hyperlink">5.2</text:span><text:span text:style-name="T20"><text:tab/></text:span><text:span text:style-name="Hyperlink">Trojos arkliai</text:span><text:tab/>6</text:a></text:p>
          <text:p text:style-name="P21"><text:a xlink:href="#_Toc224220406" office:target-frame-name="_top" xlink:show="replace"><text:span text:style-name="Hyperlink">5.3</text:span><text:span text:style-name="T22"><text:tab/></text:span><text:span text:style-name="Hyperlink">Netikri virusai</text:span><text:tab/>6</text:a></text:p>
          <text:p text:style-name="P23"><text:a xlink:href="#_Toc224220407" office:target-frame-name="_top" xlink:show="replace"><text:span text:style-name="Hyperlink">6.</text:span><text:span text:style-name="T24"><text:tab/></text:span><text:span text:style-name="Hyperlink">Pavojingumas</text:span><text:tab/>7</text:a></text:p>
          <text:p text:style-name="P25"><text:a xlink:href="#_Toc224220408" office:target-frame-name="_top" xlink:show="replace"><text:span text:style-name="Hyperlink">7.</text:span><text:span text:style-name="T26"><text:tab/></text:span><text:span text:style-name="Hyperlink">Plitimo būdai</text:span><text:tab/>7</text:a></text:p>
          <text:p text:style-name="P27"><text:a xlink:href="#_Toc224220409" office:target-frame-name="_top" xlink:show="replace"><text:span text:style-name="Hyperlink">8.</text:span><text:span text:style-name="T28"><text:tab/></text:span><text:span text:style-name="Hyperlink">Slapstymosi būdai</text:span><text:tab/>8</text:a></text:p>
          <text:p text:style-name="P29"><text:a xlink:href="#_Toc224220410" office:target-frame-name="_top" xlink:show="replace"><text:span text:style-name="Hyperlink">9.</text:span><text:span text:style-name="T30"><text:tab/></text:span><text:span text:style-name="Hyperlink">Naudota literatūra</text:span><text:tab/>8</text:a></text:p>
        </text:index-body>
      </text:table-of-content>
      <text:p text:style-name="Normal"/>
      <text:p text:style-name="Normal"><text:span text:style-name="T31">Paveikslėlių sąrašas</text:span></text:p>
      <text:p text:style-name="P32"/>
      <text:p text:style-name="P33"><text:a xlink:href="#_Toc224220433" office:target-frame-name="_top" xlink:show="replace"><text:span text:style-name="Hyperlink">1 pav. Virusas- kirminas</text:span><text:tab/>5</text:a></text:p>
      <text:p text:style-name="P34"><text:a xlink:href="#_Toc224220434" office:target-frame-name="_top" xlink:show="replace"><text:span text:style-name="T35">2 pav. Trojos virusas</text:span><text:span text:style-name="T36"><text:tab/>6</text:span></text:a></text:p>
      <text:p text:style-name="P37"><text:a xlink:href="#_Toc224220435" office:target-frame-name="_top" xlink:show="replace"><text:span text:style-name="T38">3 pav. Netikras virusas</text:span><text:span text:style-name="T39"><text:tab/>6</text:span></text:a></text:p>
      <text:p text:style-name="P40"/>
      <text:p text:style-name="P41">Lentelių sąrašas</text:p>
      <text:p text:style-name="P42"><text:a xlink:href="#_Toc224144944" office:target-frame-name="_top" xlink:show="replace"><text:span text:style-name="T43">Lentelė 1 Pagrindiniai užkrėtimo šalti</text:span><text:bookmark-start text:name="_Hlt224219390"/><text:bookmark-start text:name="_Hlt224219391"/><text:span text:style-name="T44">n</text:span><text:bookmark-end text:name="_Hlt224219390"/><text:bookmark-end text:name="_Hlt224219391"/><text:span text:style-name="T45">iai.</text:span><text:span text:style-name="T46"><text:tab/></text:span><text:span text:style-name="T47">7</text:span></text:a></text:p>
      <text:p text:style-name="P48"/>
      <text:p text:style-name="P49"/>
      <text:p text:style-name="Text"/>
      <text:p text:style-name="Text"/>
      <text:p text:style-name="P50"/>
      <text:h text:style-name="P51" text:outline-level="1"><text:bookmark-start text:name="_Toc224144900"/><text:bookmark-start text:name="_Toc224220399"/>Įvadas<text:bookmark-end text:name="_Toc224144900"/><text:bookmark-end text:name="_Toc224220399"/></text:h>
      <text:p text:style-name="Text">XX a. dešimtajame dešimtmetyje kompiuteris tapo vis svarbesniu žmogaus darbo įrankiu, kuris sugeba atlikti vis daugiau žmogui reikalingų veiksmų. Kompiuteris tapo XX a. pabaigos simboliu, nuo korio neatsiejami tapo kompiuteriniai virusai.<text:s/></text:p>
      <text:p text:style-name="Text">Kompiuteriniai virusai (dar kitaip vadinami žalingomis kompiuterinėmis progra-momis) nuo pat jų atsiradimo tobulėjo, tobulėja ir tobulės kartu su kompiuteriais. Kaip pastarieji pradėjo greičiau atlikti įvairias operacijas, didesnį jų kiekį, taip virusinės pro-gramos daro vis didesnę žalą, sugeba greičiau plisti, tampa vis sunkiau aptinkamomis.</text:p>
      <text:p text:style-name="Text">Kasmet didėja virusų padaroma žala<text:alphabetical-index-mark text:string-value="žala"/><text:s/>kompiuteriams ir jų tinklams. Atitinkamai auga ir įmonių bei institucijų išleidžiamų pinigų sumos siekiat apsaugoti savo kompiuterius bei jų tinklus nuo elektroninių pabaisų. Nepaisant to, atrodo, kad šioje kovoje vis dar laimi virusai ir tikrai nežinia, ar situacija greitu laiku keisis. Todėl kompiuteriniai virusai tampa svarbia XXI a. problema, savotišku iššūkiu globalizacijos ir kompiuterizacijos veikiamame pasaulyje, siekiant didesnio informacijos perdavimo saugumo, spartumo bei apdorojimo patikimumo.</text:p>
      <text:h text:style-name="First" text:outline-level="1"><text:bookmark-start text:name="_Toc224144901"/><text:bookmark-start text:name="_Toc224220400"/>Kompiuterinių virusų samprata<text:bookmark-end text:name="_Toc224144901"/><text:bookmark-end text:name="_Toc224220400"/></text:h>
      <text:p text:style-name="Text">Kompiuterių vartotojų terminų žodynuose virusu vadinama savaime besidauginanti programa, kuri gali plisti įterpdama savo kopijas į vis kitus failus. Dažniausiai besidau-gindami virusai šiek tiek modifikuoja savo kopijas, o tai daro juos sunkiau aptinkamus, nes atitinkamai reikalingas ir antivirusinių programų atsinaujinimas<text:s/><text:bookmark-ref text:ref-name="_Ref224130828" text:reference-format="text">[1]</text:bookmark-ref>.</text:p>
      <text:p text:style-name="Text">Kompiuteriniai virusai, tokios pačios programos, kaip ir mūsų visų kasdien naudo-jamos Word ar Exel programos, tačiau virusuose užprogramuotos veiksmų sekos ir jų po-būdis yra žalingi kompiuteriams. Virusai užkrėtę atitinkamą failą ar programą gali sėk-mingai perimti jos kontrolę ir atlikti tuos pačius veiksmus lygiagrečiai atlikdami žalingas operacijas.</text:p>
      <text:p text:style-name="Text">Kompiuteriniams virusams šis vardas buvo suteiktas neatsitiktinai – pastarųjų vei-kimas labai panašus į biologinių bendravardžių veikimą, tačiau vieni veikia gyvosiose ląstelėse, kiti - kompiuteriuose ir jų tinkluose.</text:p>
      <text:soft-page-break/>
      <text:p text:style-name="Text">Tam, kad virusas galėtų egzistuoti, jis turi patekti į tinkamą terpę – failą ar programą. Viruso įsiterpimas į programą/failą dar vadinamas infekavimu, o užkrėstasis failas „šeimininku“<text:s/><text:bookmark-ref text:ref-name="_Ref224130828" text:reference-format="text">[1]</text:bookmark-ref>.</text:p>
      <text:p text:style-name="Text">Vos atsiradus pirmosioms kenkėjiškoms kompiuterinėms programoms joms buvo suteiktas virusų vardas, kurio samprata bėgant laikui keitėsi. Keičiantis virusų veikimo principams, būdams, daromos žalos pobūdžiui kilo būtinybė juos tinkamai klasifikuoti. Šiandieniniame kompiuterinių technologijų pasaulyje virusais vadinamos visos kompiute-riams kenkiančios programos, tačiau bandant toliau skirstyti virusus, įvairioje literatūroje pateikiama klasifikacija yra skirtingos apimties. Dažniausiai virusai skirstomi į virusus (siauresniąja prasme), kirminus, Trojanus ir paslėptuosius Trojanus. Svarbu paminėti tai, kad virusai siaurąja prasme šiandien yra pagal paplitimą aplenkti kitų savo atmainų, kurios ypatingai greitai plisti padėjo atsiradus internetui.<text:s/></text:p>
      <text:h text:style-name="First" text:outline-level="1"><text:bookmark-start text:name="_Toc224144902"/><text:bookmark-start text:name="_Toc224220401"/>Atsiradimo prielaidos<text:bookmark-end text:name="_Toc224144902"/><text:bookmark-end text:name="_Toc224220401"/></text:h>
      <text:p text:style-name="Text">Literatūroje dažniausiai aptinkama pirmojo viruso atsiradimo data 1982 m., tačiau teoriniai pagrindai tam buvo sudėti daug anksčiau. Jau 1949 m. John fon Neumann pir-mąsyk pateikė teorinį programos-viruso modelį. Pirmoji programa turėjusi kompiuterinio viruso bruožų buvo 1960 m. sukurtas žaidimas Core War, tačiau jis nebuvo tikras virusas, galintis daugintis už kūrimo aplinkos ribų<text:s/><text:bookmark-ref text:ref-name="_Ref224130874" text:reference-format="text">[2]</text:bookmark-ref>.<text:s/></text:p>
      <text:p text:style-name="Text">Pirmuoju tikru kompiuteriniu virusu daugelis tyrinėtojų laiko programą Elk Cloner, kuri buvo parašyta 1982 m. Rich Skrenta. Manoma, jog tai pirmasis kompiuterinis virusas<text:alphabetical-index-mark text:string-value="kompiuterinis virusas"/><text:s/>paplitęs už kūrimo aplinkos ribų. Šis virusas plito diskeliais, užkrėsdamas Apple DOS 3.3 operacinę sistemą. Virusas pasileisdavo kiekvieną kartą užkraunant kompiuterį iš diskelio. Jis netrukdė dirbti su kompiuteriu, tik stebėdavo sistemos darbą su diskais, užkrėsdamas kiekvieną, dar neužkrėstą, diskelį. Būtent tokiu pačiu principu (užkrėsdavo diskelio ar kietojo disko formatavimo sektorių ir kiekvieną sykį paleidžiant failus/programas dau-gindavosi) veikė ir dauguma kitų kompiuterinių virusų iki interneto atsiradimo.</text:p>
      <text:p text:style-name="Text">Be ginčų apie pirmąjį kompiuterinį virusą netyla diskusijos ir dėl pirmo termino „kompiuterinis virusas<text:alphabetical-index-mark text:string-value="kompiuterinis virusas"/>“ pavartojimo. Dar 1970-ųjų viduryje Deivid Gerrold vienoje mokslinės fantastikos novelėje aprašydamas kompiuterines programas pavartojo terminą virusas. Panašiu laiku Džonas Bruneris savo novelėje „Shockwave riders“ aprašė progra-mas, kurios sklido tinklais trindamos duomenis. Vis dėlto pirmą kartą terminas „kompiu-terinis virusas“ moksliniame leidinyje buvo panaudotas Fred Cohen straipsnyje „Experiments with Computer Viruses“<text:s/><text:bookmark-ref text:ref-name="_Ref224130874" text:reference-format="text">[2]</text:bookmark-ref>.</text:p>
      <text:soft-page-break/>
      <text:p text:style-name="Text">1986 m. atsirado visiškai naujos rūšies virusas. Trojos arklys - taip buvo pavadintas šis virusas , kuris apsimesdavo esąs kita, žinoma programa. Buvo manoma, kad jie vykdo naudingus veiksmus, o iš tikro Trojos arkliai iškart pradėdavo destrukciją, dažniausiai išvogdami iš apkrėstojo kompiuterio įvairius duomenis<text:s/><text:bookmark-ref text:ref-name="_Ref224130897" text:reference-format="text">[3]</text:bookmark-ref>.</text:p>
      <text:p text:style-name="Text">Interneto plitimas XX a. pabaigoje leido atsirasti ir netikriems virusams, vadina-miems Hoaxs vardu. Šie virusai žalos kompiuteriams nedaro, tačiau pranešdami apie ne-tikrus virusus ar kitą informaciją ir priversdami interneto vartotojus persiųsti tokius laiškus kitiems, paralyžiuoja interneto tinklus<text:s/><text:bookmark-ref text:ref-name="_Ref224130897" text:reference-format="text">[3]</text:bookmark-ref>.</text:p>
      <text:h text:style-name="First" text:outline-level="1"><text:bookmark-start text:name="_Toc224144903"/><text:bookmark-start text:name="_Toc224220402"/>Virusų dauginimasis<text:bookmark-end text:name="_Toc224144903"/><text:bookmark-end text:name="_Toc224220402"/></text:h>
      <text:p text:style-name="Text">Kompiuteriniai virusai plinta kaip ir biologiniai jų giminaičiai, kurie patekę į gyvą ląstelę, dauginasi, o po to užkrečia kitas ląsteles. Tam, kad kompiuteriniai virusai galėtų kurti savo atmainas, jie turi turėti galimybę perrašyti savo kodus ir įrašyti juos į kompiu-terio atmintį. Dėl to dauguma kompiuterinių virusų „prilimpa“ prie paleidžiamųjų sistemų ar programų failų – taip garantuojamas jų paleidimas paleidus atitinkamą programą. Pagal tai, kaip virusai elgiasi juos paleidus, galima skirti 2 jų kategorijas. Nerezidentiniai arba nenuolatiniai virusai tuoj pat po užkrėtimo ieško naujų failų, kuriuos galėtų užkrėsti, o užkrėtę, perduoda kontrolę infekuotos programos paleidžiamajam failui. Tuo tarpu rezi-dentiniai arba operatyviosios atminties virusai neieško naujų failų, kol nėra paleidžiami. Šie virusai įrašomi į jo „paleidėjo“ atmintį ir vėliau veiksmai vykdomi užkrėstos programos paleidžiamojo failo. Jie išlieka aktyvūs ir veikia nepranešdami apie save kartu užkrėsdami failus, kuriais naudojasi užkrėsta programa ar operacinė sistema.</text:p>
      <text:p text:style-name="Text">Nenuolatiniai virusai yra sudaryti iš paieškos ir replikacijos modulių. Pirmasis mo-dulis ieško naujų failų, kuriuos galima būtų užkrėsti, o aptikęs iškviečia replikacijos mo-dulį, kuris ir užkrečia failą. Nesudėtingų virusų replikacijos moduliai pirmiausiai atidaro failą, patikrina, ar jis neinfekuotas prijungia viruso kodą, atlieka pakeitimus vykdomajame faile taip, kad programos pradinis taškas rodytų į viruso kodo dalį, o viruso kodo pabaiga rodytų į ankstesnę programos pradžią, išsaugoja ir uždaro vykdomąjį failą ir grįžta į paieškos modulį, kad toliau būtų gali atlikti failų paieškas.</text:p>
      <text:soft-page-break/>
      <text:p text:style-name="Text">Operatyviosios atminties virusai turi replikacijos modulį, kuris yra kažkiek panašus į nenuolatinių virusų paieškos modulį. Paleistas virusas įrašo savo kodą į programos/failo atmintį, tuo užsitikrindamas paleidimą kiekvienąsyk, kai operacinės sistema bus paleista.<text:s/></text:p>
      <text:p text:style-name="Text">Virusai užkrečia įvairiausius failus, tačiau dažniausiai jie yra pajėgūs atakuoti tik vienos ar dviejų rūšių „šeimininkus“. Dažniausiai pasitaikantys kompiuterinių virusų „šeimininkai“:</text:p>
      <text:p text:style-name="Text">•<text:tab/>Dvejetainės sistemos vykdomieji failai (MS-DOS <text:s/>sistemoje failai su galūnėmis *.com ir *.exe, vykdomieji MS Windows failai, ELF failai Linux operacinėje sistemoje);</text:p>
      <text:p text:style-name="Text">•<text:tab/>Paleidžiamieji sektoriai diskeliuose arba kietųjų diskų segmentavimo zonos;<text:s/></text:p>
      <text:p text:style-name="Text">•<text:tab/>Kietųjų diskų;<text:s/></text:p>
      <text:p text:style-name="Text">•<text:tab/>Dokumentai su makrokomandomis (MS Word dokumentai, MS skaičiuoklės, AmiPro dokumentai, MS Office failai bei <text:s/>MS Access duomenų bazės).</text:p>
      <text:h text:style-name="First" text:outline-level="1"><text:bookmark-start text:name="_Toc224144904"/><text:bookmark-start text:name="_Toc224220403"/>Virusų rūšys<text:bookmark-end text:name="_Toc224144904"/><text:bookmark-end text:name="_Toc224220403"/></text:h>
      <text:p text:style-name="Text">Kompiuteriniai virusai gali būti klasifikuojami pagal įvairiausius kriterijus: kilmę, technologiją, failus, kuriuos jie puola, slėpimosi būdą ir vietą, jų daromos žalos pobūdį, operacinės sistemos rūšį, kuri yra atakuojama tam tikro viruso. Netgi paprastas virusas, jei jis yra kompleksinio pobūdžio, gali priklausyti keletui kategorijų. Tuo tarpu nauji virusai gali priversti antivirusinių programų kūrėjus iš naujo sudaryti virusų klasifikavimo kategorijas ar net sukurti naujas.</text:p>
      <text:p text:style-name="Text">Įvairioje literatūroje galima rasti įvairiai išskiriamus virusų tipus, ir šioje dalyje pa-bandysiu apžvelgti pagrindines, pasaulyje labiausiai paplitusias kompiuterių kenkėjų rūšis.</text:p>
      <text:h text:style-name="Second" text:outline-level="2"><text:bookmark-start text:name="_Toc224144905"/><text:bookmark-start text:name="_Toc224220404"/>Kirminai<text:bookmark-end text:name="_Toc224144905"/><text:bookmark-end text:name="_Toc224220404"/><text:s/></text:h>
      <text:p text:style-name="Text"><draw:frame draw:z-index="251668480" draw:id="id3" draw:style-name="a9" draw:name="Text Box 1" text:anchor-type="paragraph" svg:x="5.52083in" svg:y="1.09583in" svg:width="1.38125in" svg:height="0in" style:rel-width="scale" style:rel-height="scale"><draw:text-box><text:p text:style-name="Caption"><text:bookmark-start text:name="_Ref224220241"/><text:bookmark-start text:name="_Toc224220433"/>1 pav.<text:bookmark-end text:name="_Ref224220241"/><text:s/>Virusas- kirminas<text:bookmark-end text:name="_Toc224220433"/></text:p></draw:text-box><svg:title/><svg:desc/></draw:frame><draw:frame draw:z-index="251658240" draw:style-name="a10" draw:name="Picture 1" text:anchor-type="paragraph" svg:x="0in" svg:y="7.84167in" svg:width="0.97917in" svg:height="1.025in" style:rel-width="scale" style:rel-height="scale"><draw:image xlink:href="media/image1.jpeg" xlink:type="simple" xlink:show="embed" xlink:actuate="onLoad"/><svg:title/><svg:desc/></draw:frame><text:s/>Kažkuria prasme kirminai yra virusų poklasis pagal paplitimą aplenkęs pačius viru-sus (žr.<text:s/><text:bookmark-ref text:ref-name="_Ref224220241" text:reference-format="text">1 pav.</text:bookmark-ref>). Plisdami iš vieno kompiuterio į kitą kirminai tai daro automatiškai, užvaldydami kompiuterio funkcijas, kurios gali perkelti failus ar informaciją.<text:s/><text:span text:style-name="T52">Beje, kirminai gali atlikti ne vieną funkciją, o tiek, kiek jų yra užprogramuota. Kirminas patekęs į sistemą, gali keliauti savarankiškai. Didžiausias jų keliamas pavojus - sugebėjimas daugintis dideliais kiekiais. Kirminas išsiuntinėja<text:s/></text:span><text:soft-page-break/><text:span text:style-name="T53">savo kopijas visais el. pašto adresų dėžutėje saugomais adresais, tą patį padaro ir gavėjų kompiuteriai, todėl per trumpą laiką apkraudami ir sulėtinamas tinklų veikimas.</text:span></text:p>
      <text:p text:style-name="P54">Kirminai dažniausiai plinta be vartotojo veiksmų ir platina savo kopijas (kai kada - modifikuotas) tinkluose. Kirminas gali užimti kompiuterio atmintį arba tinklo ryšį, ir taip kompiuteris gali nustoti reaguoti į vartotojo veiksmus. Vienas žinomiausių kirminų My-doom savo piko metu sugebėjo sulėtinti interneto veikimą viso pasaulio mastu. Kadangi kirminams nereikalinga programa ar failas, prie kurio jie turėtų prisikabinti, jie gali sukurti tunelį į vartotojo kompiuterį ir perleisti kontrolę bei valdymą kitiems vartotojams.<text:s/></text:p>
      <text:h text:style-name="Second" text:outline-level="2"><text:bookmark-start text:name="_Toc224144906"/><text:bookmark-start text:name="_Toc224220405"/>Trojos arkliai<text:bookmark-end text:name="_Toc224144906"/><text:bookmark-end text:name="_Toc224220405"/><text:s/></text:h>
      <text:p text:style-name="Text"><draw:frame draw:z-index="251670528" draw:id="id4" draw:style-name="a11" draw:name="Text Box 1" text:anchor-type="paragraph" svg:x="5.4375in" svg:y="1.21806in" svg:width="1.46528in" svg:height="0in" style:rel-width="scale" style:rel-height="scale"><draw:text-box><text:p text:style-name="Caption"><text:bookmark-start text:name="_Ref224220267"/><text:bookmark-start text:name="_Toc224220434"/>2 pav.<text:bookmark-end text:name="_Ref224220267"/><text:s/>Trojos virusas<text:bookmark-end text:name="_Toc224220434"/></text:p></draw:text-box><svg:title/><svg:desc/></draw:frame><draw:frame draw:z-index="251661312" draw:style-name="a12" draw:name="Picture 2" text:anchor-type="paragraph" svg:x="0in" svg:y="0.00417in" svg:width="1.05833in" svg:height="1.15417in" style:rel-width="scale" style:rel-height="scale"><draw:image xlink:href="media/image2.jpeg" xlink:type="simple" xlink:show="embed" xlink:actuate="onLoad"/><svg:title/><svg:desc/></draw:frame>Dar viena virusų atmaina, kuri veikia panašiai kaip ir mitologijoje minimas Trojos arklys (žr.<text:s/><text:bookmark-ref text:ref-name="_Ref224220267" text:reference-format="text">2 pav.</text:bookmark-ref>). Trojanai<text:alphabetical-index-mark text:string-value="Trojanai"/><text:s/>į kompiuterį dažniausiai patenka per užkrėstas programas, kurios pradžioje atrodo visiškai nepavojingos. Šie virusai nesidaugina taip kaip kirminai ir neplinta užkrėsdami failus kaip virusai. Užpuolę sistemą jie turi galimybę ištrinti bylas, sunaikinti kitą kietojo disko informaciją bei atidaryti prieigą pašaliniams vartotojams, vogti informaciją iš užkrėsto kompiuterio. Pastaroji virusų galimybė ypač pavojinga, kadangi įmanoma, jog svarbi informacija pateks į svetimas rankas, kompiuteris nebus kontroliuojamas jo šeimininko.</text:p>
      <text:h text:style-name="Second" text:outline-level="2"><text:bookmark-start text:name="_Toc224144907"/><text:bookmark-start text:name="_Toc224220406"/>Netikri virusai<text:bookmark-end text:name="_Toc224144907"/><text:bookmark-end text:name="_Toc224220406"/><text:tab/></text:h>
      <text:p text:style-name="Text"><draw:frame draw:z-index="251672576" draw:id="id5" draw:style-name="a13" draw:name="Text Box 1" text:anchor-type="paragraph" svg:x="5.14583in" svg:y="1.55069in" svg:width="1.35in" svg:height="0in" style:rel-width="scale" style:rel-height="scale"><draw:text-box><text:p text:style-name="Caption"><text:bookmark-start text:name="_Ref224220290"/><text:bookmark-start text:name="_Toc224220435"/>3 pav.<text:bookmark-end text:name="_Ref224220290"/><text:s/>Netikras virusas<text:bookmark-end text:name="_Toc224220435"/></text:p></draw:text-box><svg:title/><svg:desc/></draw:frame><draw:frame draw:z-index="251664384" draw:style-name="a14" draw:name="Picture 3" text:anchor-type="paragraph" svg:x="0in" svg:y="0.00486in" svg:width="1.35in" svg:height="1.48403in" style:rel-width="scale" style:rel-height="scale"><draw:image xlink:href="media/image3.gif" xlink:type="simple" xlink:show="embed" xlink:actuate="onLoad"/><svg:title/><svg:desc/></draw:frame>Šie virusai dažnai yra palaikomi tikrais virusais, tačiau taip nėra, ir jie nekelia jokio pavojaus kompiuteriui. Šiam tipui priskiriami Hoax virusai ir vadinamieji „juokeliai“ (žr.<text:s/><text:bookmark-ref text:ref-name="_Ref224220290" text:reference-format="text">3 pav.</text:bookmark-ref>). Hoax virusai yra klaidinantys el. pašto laiškai, kurie įspėja apie netikrus ir neeg-zistuojančius virusus. Jų tikslas sukelti paniką tarp kompiuterių vartotojų. Dažniausiai tokiose žinutėse yra techninių terminų, kurie suklaidina vartotojus, kartais tokių pranešimų pradžioje paminimos žinomos firmos (pvz., žinių agentūros ar antivirusinių programų kompanijos), kas dar labiau įtikina tokių pranešimų gavėjus, jog informacija yra apie tikrus virusus. Dažnai juose būna nurodyta ir atitinkami veiksmai, kaip apsisaugoti nuo kompiuterinių virusų .</text:p>
      <text:h text:style-name="First" text:outline-level="1"><text:bookmark-start text:name="_Toc224144908"/><text:bookmark-start text:name="_Toc224220407"/><text:soft-page-break/>Pavojingumas<text:bookmark-end text:name="_Toc224144908"/><text:bookmark-end text:name="_Toc224220407"/></text:h>
      <text:p text:style-name="Text">Virusai gali būti klasifikuojami pagal įvairias kategorijas, o viena svarbiausių – pa-vojingumas. Į šią kategoriją virusai skirstomi nevienareikšmiškai. Pagal šį požymį virusus galima skirstyti atsižvelgiant į jų paplitimą ir daromą žalą. Remiantis šiais kriterijais ski-riamos tokios virusų grupės: 1. mažo pavojingumo (mažai paplitę ir mažai žalingi); 2. vi-dutiniškai pavojingi (virusas mažai paplitęs, bet gana pavojingas, arba paplitęs, bet mažai pavojingas); 3. pavojingi (virusas labai paplitęs ir pavojingas arba paplitęs ir labai pavo-jingas); 4. labai pavojingas (virusas labai paplitęs ir labai pavojingas).</text:p>
      <text:p text:style-name="Text">Virusai laikui bėgant gali priklausyti skirtingoms kategorijoms, nes nuo jų paplitimo priklauso ir galimas žalos mastas.<text:s/></text:p>
      <text:p text:style-name="Text">Skaičiuojant viruso paplitimo lygmenį yra nustatomas užkrėtimo dažnis (t.y. už-krėstų kompiuterių skaičius bendram kompiuterių skaičiui). Yra skiriami tokie paplitimo lygmenys: 1. epidemija (užkrėstų kompiuterių skaičius viršija 10%); 2. labai paplitęs (7,5-10%); 3. vidutiniškai paplitęs (1-2,5%); 4. mažai paplitęs (&lt;1%).</text:p>
      <text:h text:style-name="First" text:outline-level="1"><text:bookmark-start text:name="_Toc224144909"/><text:bookmark-start text:name="_Toc224220408"/>Plitimo būdai<text:bookmark-end text:name="_Toc224144909"/><text:bookmark-end text:name="_Toc224220408"/></text:h>
      <text:p text:style-name="Text">Virusai patenka į kompiuterius kanalais, kurie naudojami informacijos mainams. Pagal plitimo būdus, kompiuteriniai virusai gali būti skirstomi į plintančius internetu, tinklais ir diskais (lentelė 1).</text:p>
      <text:p text:style-name="P55"><text:bookmark-start text:name="_Toc224144236"/><text:bookmark-start text:name="_Toc224144944"/>Lentelė 1. Pagrindiniai užkrėtimo šaltiniai<text:bookmark-end text:name="_Toc224144236"/><text:bookmark-end text:name="_Toc224144944"/></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Iš kur kilęs virusas</text:p>
          </table:table-cell>
          <table:table-cell table:style-name="TableCell64">
            <text:p text:style-name="P65">1998</text:p>
          </table:table-cell>
          <table:table-cell table:style-name="TableCell66">
            <text:p text:style-name="P67">1999</text:p>
          </table:table-cell>
          <table:table-cell table:style-name="TableCell68">
            <text:p text:style-name="P69">2000</text:p>
          </table:table-cell>
        </table:table-row>
        <table:table-row table:style-name="TableRow70">
          <table:table-cell table:style-name="TableCell71">
            <text:p text:style-name="P72">El.laiško priedai</text:p>
          </table:table-cell>
          <table:table-cell table:style-name="TableCell73">
            <text:p text:style-name="P74">32%</text:p>
          </table:table-cell>
          <table:table-cell table:style-name="TableCell75">
            <text:p text:style-name="P76">56%</text:p>
          </table:table-cell>
          <table:table-cell table:style-name="TableCell77">
            <text:p text:style-name="P78">87%</text:p>
          </table:table-cell>
        </table:table-row>
        <table:table-row table:style-name="TableRow79">
          <table:table-cell table:style-name="TableCell80">
            <text:p text:style-name="P81">Diskeliai (iš namų)</text:p>
          </table:table-cell>
          <table:table-cell table:style-name="TableCell82">
            <text:p text:style-name="P83">36%</text:p>
          </table:table-cell>
          <table:table-cell table:style-name="TableCell84">
            <text:p text:style-name="P85">25%</text:p>
          </table:table-cell>
          <table:table-cell table:style-name="TableCell86">
            <text:p text:style-name="P87">4%</text:p>
          </table:table-cell>
        </table:table-row>
        <table:table-row table:style-name="TableRow88">
          <table:table-cell table:style-name="TableCell89">
            <text:p text:style-name="P90">Neaišku</text:p>
          </table:table-cell>
          <table:table-cell table:style-name="TableCell91">
            <text:p text:style-name="P92">5%</text:p>
          </table:table-cell>
          <table:table-cell table:style-name="TableCell93">
            <text:p text:style-name="P94">7%</text:p>
          </table:table-cell>
          <table:table-cell table:style-name="TableCell95">
            <text:p text:style-name="P96">2%</text:p>
          </table:table-cell>
        </table:table-row>
        <table:table-row table:style-name="TableRow97">
          <table:table-cell table:style-name="TableCell98">
            <text:p text:style-name="P99">Diskeliai (kiti)</text:p>
          </table:table-cell>
          <table:table-cell table:style-name="TableCell100">
            <text:p text:style-name="P101">21%</text:p>
          </table:table-cell>
          <table:table-cell table:style-name="TableCell102">
            <text:p text:style-name="P103">9%</text:p>
          </table:table-cell>
          <table:table-cell table:style-name="TableCell104">
            <text:p text:style-name="P105">2%</text:p>
          </table:table-cell>
        </table:table-row>
        <table:table-row table:style-name="TableRow106">
          <table:table-cell table:style-name="TableCell107">
            <text:p text:style-name="P108">Internetas</text:p>
          </table:table-cell>
          <table:table-cell table:style-name="TableCell109">
            <text:p text:style-name="P110">9%</text:p>
          </table:table-cell>
          <table:table-cell table:style-name="TableCell111">
            <text:p text:style-name="P112">11%</text:p>
          </table:table-cell>
          <table:table-cell table:style-name="TableCell113">
            <text:p text:style-name="P114">1%</text:p>
          </table:table-cell>
        </table:table-row>
        <table:table-row table:style-name="TableRow115">
          <table:table-cell table:style-name="TableCell116">
            <text:p text:style-name="P117">Vidinis tinklas</text:p>
          </table:table-cell>
          <table:table-cell table:style-name="TableCell118">
            <text:p text:style-name="P119">3%</text:p>
          </table:table-cell>
          <table:table-cell table:style-name="TableCell120">
            <text:p text:style-name="P121">2%</text:p>
          </table:table-cell>
          <table:table-cell table:style-name="TableCell122">
            <text:p text:style-name="P123">1%</text:p>
          </table:table-cell>
        </table:table-row>
        <table:table-row table:style-name="TableRow124">
          <table:table-cell table:style-name="TableCell125">
            <text:p text:style-name="P126">Platinami CD</text:p>
          </table:table-cell>
          <table:table-cell table:style-name="TableCell127">
            <text:p text:style-name="P128">2%</text:p>
          </table:table-cell>
          <table:table-cell table:style-name="TableCell129">
            <text:p text:style-name="P130">0%</text:p>
          </table:table-cell>
          <table:table-cell table:style-name="TableCell131">
            <text:p text:style-name="P132">1%</text:p>
          </table:table-cell>
        </table:table-row>
        <table:table-row table:style-name="TableRow133">
          <table:table-cell table:style-name="TableCell134">
            <text:p text:style-name="P135">Demonstraciniai diskeliai</text:p>
          </table:table-cell>
          <table:table-cell table:style-name="TableCell136">
            <text:p text:style-name="P137">4%</text:p>
          </table:table-cell>
          <table:table-cell table:style-name="TableCell138">
            <text:p text:style-name="P139">2%</text:p>
          </table:table-cell>
          <table:table-cell table:style-name="TableCell140">
            <text:p text:style-name="P141">&lt;1%</text:p>
          </table:table-cell>
        </table:table-row>
        <table:table-row table:style-name="TableRow142">
          <table:table-cell table:style-name="TableCell143">
            <text:p text:style-name="P144">Naršymas po WWW</text:p>
          </table:table-cell>
          <table:table-cell table:style-name="TableCell145">
            <text:p text:style-name="P146">2%</text:p>
          </table:table-cell>
          <table:table-cell table:style-name="TableCell147">
            <text:p text:style-name="P148">3%</text:p>
          </table:table-cell>
          <table:table-cell table:style-name="TableCell149">
            <text:p text:style-name="P150">0%</text:p>
          </table:table-cell>
        </table:table-row>
      </table:table>
      <text:p text:style-name="P151"><text:bookmark-start text:name="_Toc224144910"/></text:p>
      <text:h text:style-name="First" text:outline-level="1"><text:bookmark-start text:name="_Toc224220409"/><text:soft-page-break/>Slapstymosi būdai<text:bookmark-end text:name="_Toc224144910"/><text:bookmark-end text:name="_Toc224220409"/></text:h>
      <text:section text:name="Sect1" text:style-name="S1">
        <text:p text:style-name="P152">Virusai yra laikomi pirmaisiais dirbtinio intelekto atstovais, todėl nenuo-stabu, kad jų gebėjimas slapstytis tobulė-ja, kartu su antivirusinėmis programomis ir kompiuteriais.</text:p>
        <text:p text:style-name="Text"><text:span text:style-name="T153">Dauguma MS-DOS</text:span><text:span text:style-name="T154"><text:note text:note-class="footnote" text:id="_ftn0"><text:note-citation text:label="a)">a)</text:note-citation><text:note-body><text:p text:style-name="footnotedescription">-DOS - kompanijos „Microsoft“ sukurta diskų operacinė sistema<text:s/></text:p><text:p text:style-name="Normal"/><text:p text:style-name="Normal"/></text:note-body></text:note><text:s/></text:span><text:span text:style-name="T155">sistemos viru-sų stengiasi maskuotis nepakeisdami už-krėsto failo modifikavimo datos, tačiau dabartinės antivirusinėms programoms tai nėra didelė kliūtis. Kai kurie virusai užkrėsdami failus sugeba nepakeisti jų dydžio – tai vadinamieji užpildantys vi-rusai Jie tai sugeba padaryti perrašydami neišnaudotas failų vietas<text:s/></text:span><text:span text:style-name="T156"><text:bookmark-ref text:ref-name="_Ref224130935" text:reference-format="text">[4]</text:bookmark-ref></text:span><text:span text:style-name="T157">.</text:span></text:p>
        <text:p text:style-name="P158">Tam, kad galėtų egzistuoti, virusai turi užkrėsti failus, tačiau, tačiau ne visų failų užkrėtimas yra vienodai pavojingas pačiam virusui. Šiuolaikinės antivirusinės programos prieš pradėdamos kompiuterio skenavimą dažniausiai pirmiausia nuskenuoja savo failus. Dėl šios prie-žasties dauguma šiandieninių<text:s/>virusų yra suprogramuoti taip, kad nepultų tokio pobūdžio programų failų. Kitos bylos, kurių stengiasi vengti virusai yra vadi-namieji failai-masalai . Tai antivirusi-nių programų ar profesionalų sukurti fai-lai skirti virusų užkrėtimui. Jais naudo-jantis: 1. profesionalai gali aptikti virusų pavyzdžius, nesukeliant didesnės žalos kompiuteriui; 2. virusų gaudytojams taip lengviau stebėti virusų elgseną ir nusta-tyti tinkamus virusų aptikimo būdus (tai labai efektyvu gaudant polimorfinius vi-rusus. Užkrėtus daug failų-masalų galima nesunkiai patikrinti, ar antivirusinė sistema yra veiksminga; 3. kuomet tokio pobūdžio failai yra modifikuojami, anti-virusinė sistema iš karto gauna pavojaus signalą, jog virusas yra sistemoje.</text:p>
      </text:section>
      <text:section text:name="Sect2" text:style-name="S2">
        <text:p text:style-name="P159"><text:bookmark-start text:name="_Toc224144911"/></text:p>
        <text:h text:style-name="First" text:outline-level="1"><text:bookmark-start text:name="_Toc224220410"/>Naudota literatūra<text:bookmark-end text:name="_Toc224144911"/><text:bookmark-end text:name="_Toc224220410"/></text:h>
        <text:list text:style-name="LFO3" text:continue-numbering="true">
          <text:list-item>
            <text:p text:style-name="Literature"><text:bookmark-start text:name="_Ref224130828"/>Prieiga per internetą - http://en.wikipedia.org/wiki/Computer_virus#History (žiūtėta 2005-05-01)<text:bookmark-end text:name="_Ref224130828"/></text:p>
          </text:list-item>
          <text:list-item>
            <text:p text:style-name="Literature"><text:bookmark-start text:name="_Ref224130874"/>H. Thimbleby. A framework for modeling trojans and computer virus infection. Computer Journal, 41(7), pp. 444 - 458, 1999<text:bookmark-end text:name="_Ref224130874"/></text:p>
          </text:list-item>
          <text:list-item>
            <text:p text:style-name="Literature"><text:bookmark-start text:name="_Ref224130897"/><text:soft-page-break/>A. Lakhotia. Virus Analysis: Techniques, Tools, and Research Issues. 11th Working Conference on Reverse Engineering, pp2, 2004 lapkritis.<text:bookmark-end text:name="_Ref224130897"/></text:p>
          </text:list-item>
          <text:list-item>
            <text:p text:style-name="Literature"><text:bookmark-start text:name="_Ref224130935"/>Prieiga per internetą -http://www.pandasoftware.com/virus_info/ about_virus/ information3.htm (žiūtėta 2005-05-01)<text:bookmark-end text:name="_Ref224130935"/></text:p>
          </text:list-item>
        </text:list>
        <text:alphabetical-index text:name="_IDX81">
          <text:alphabetical-index-source text:alphabetical-separators="true" fo:language="lt" fo:country="LT">
            <text:index-title-template/>
            <text:alphabetical-index-entry-template text:outline-level="1" text:style-name="Index1">
              <text:index-entry-text/>
              <text:index-entry-span>, </text:index-entry-span>
              <text:index-entry-page-number/>
            </text:alphabetical-index-entry-template>
            <text:alphabetical-index-entry-template text:outline-level="2" text:style-name="Index2">
              <text:index-entry-text/>
              <text:index-entry-span>, </text:index-entry-span>
              <text:index-entry-page-number/>
            </text:alphabetical-index-entry-template>
            <text:alphabetical-index-entry-template text:outline-level="3" text:style-name="Index3">
              <text:index-entry-text/>
              <text:index-entry-span>, </text:index-entry-span>
              <text:index-entry-page-number/>
            </text:alphabetical-index-entry-template>
            <text:alphabetical-index-entry-template text:outline-level="separator" text:style-name="IndexHeading">
              <text:index-entry-text/>
            </text:alphabetical-index-entry-template>
          </text:alphabetical-index-source>
          <text:index-body>
            <text:p text:style-name="P160"><text:span text:style-name="T161">K</text:span></text:p>
            <text:p text:style-name="P162">kompiuterinis virusas, 3</text:p>
            <text:p text:style-name="P163"><text:span text:style-name="T164">T</text:span></text:p>
            <text:p text:style-name="P165">Trojanai, 6</text:p>
            <text:p text:style-name="P166"><text:span text:style-name="T167">Ž</text:span></text:p>
            <text:p text:style-name="P168">žala, 2</text:p>
          </text:index-body>
        </text:alphabetical-index>
        <text:p text:style-name="P169"/>
        <text:p text:style-name="Text"><text:s/></text:p>
        <text:p text:style-name="Text"/>
        <text:p text:style-name="Text"/>
        <text:p text:style-name="Tex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First" style:display-name="First" style:family="paragraph" style:parent-style-name="Text" style:default-outline-level="1">
      <style:paragraph-properties fo:margin-top="0.25in" fo:margin-bottom="0.1666in"/>
      <style:text-properties fo:font-weight="bold" style:font-weight-asian="bold" fo:font-size="14pt" style:font-size-asian="14pt" fo:hyphenate="false"/>
    </style:style>
    <style:style style:name="Second" style:display-name="Second" style:family="paragraph" style:parent-style-name="Text" style:default-outline-level="2">
      <style:paragraph-properties fo:margin-top="0.1666in" fo:margin-bottom="0.1666in"/>
      <style:text-properties fo:font-weight="bold" style:font-weight-asian="bold" fo:font-style="italic" style:font-style-asian="italic" fo:hyphenate="false"/>
    </style:style>
    <style:style style:name="Normal" style:display-name="Normal" style:family="paragraph">
      <style:text-properties fo:language="pl" fo:country="PL" fo:hyphenate="false"/>
    </style: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DefaultParagraphFont" style:display-name="Default Paragraph Font" style:family="text"/>
    <text:list-style style:name="WW_OutlineListStyle_1" style:display-name="WW_OutlineListStyle_1">
      <text:list-level-style-number text:level="1" style:num-suffix="." style:num-list-format-name="NLF0" style:num-format="1">
        <style:list-level-properties text:space-before="0.3937in" text:min-label-width="0.6083in" text:list-level-position-and-space-mode="label-alignment">
          <style:list-level-label-alignment text:label-followed-by="listtab" fo:margin-left="1.002in" fo:text-indent="-0.6083in"/>
        </style:list-level-properties>
      </text:list-level-style-number>
      <text:list-level-style-number text:level="2" style:num-list-format-name="NLF0" style:num-format="1" text:display-levels="2">
        <style:list-level-properties text:space-before="0.3937in" text:min-label-width="0.6062in" text:list-level-position-and-space-mode="label-alignment">
          <style:list-level-label-alignment text:label-followed-by="listtab" fo:margin-left="1in" fo:text-indent="-0.6062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pl" fo:country="PL"/>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pl" fo:country="PL"/>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pl" fo:country="PL"/>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pl" fo:country="PL"/>
    </style:style>
    <style:style style:name="Heading5Char" style:display-name="Heading 5 Char" style:family="text" style:parent-style-name="DefaultParagraphFont">
      <style:text-properties style:font-name-asian="Times New Roman" style:font-name-complex="Times New Roman" fo:color="#0F4761" fo:language="pl" fo:country="PL"/>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pl" fo:country="PL"/>
    </style:style>
    <style:style style:name="Heading7Char" style:display-name="Heading 7 Char" style:family="text" style:parent-style-name="DefaultParagraphFont">
      <style:text-properties style:font-name-asian="Times New Roman" style:font-name-complex="Times New Roman" fo:color="#595959" fo:language="pl" fo:country="PL"/>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pl" fo:country="PL"/>
    </style:style>
    <style:style style:name="Heading9Char" style:display-name="Heading 9 Char" style:family="text" style:parent-style-name="DefaultParagraphFont">
      <style:text-properties style:font-name-asian="Times New Roman" style:font-name-complex="Times New Roman" fo:color="#272727" fo:language="pl" fo:country="PL"/>
    </style:style>
    <style:style style:name="Title" style:display-name="Title" style:family="paragraph" style:parent-style-name="Normal" style:next-style-name="Normal">
      <style:paragraph-properties style:contextual-spacing="true" fo:text-align="center" fo:margin-bottom="0.0555in" fo:line-height="100%"/>
      <style:text-properties style:font-name="Times New Roman"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letter-spacing="-0.0069in" style:letter-kerning="true" fo:font-size="28pt" style:font-size-asian="28pt" style:font-size-complex="28pt" fo:language="pl" fo:country="PL"/>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pl" fo:country="PL"/>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pl" fo:country="PL"/>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pl" fo:country="PL"/>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pl" fo:country="PL"/>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pl" fo:country="PL"/>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fo:language="pl" fo:country="PL"/>
    </style:style>
    <style:style style:name="Text" style:display-name="Text" style:family="paragraph" style:parent-style-name="PlainText">
      <style:paragraph-properties fo:text-align="justify" fo:line-height="150%" fo:text-indent="0.3937in"/>
      <style:text-properties style:font-name="Times New Roman" fo:font-size="12pt" style:font-size-asian="12pt" fo:language="en" fo:country="US" fo:hyphenate="false"/>
    </style:style>
    <style:style style:name="TextChar" style:display-name="Text Char" style:family="text" style:parent-style-name="PlainTextChar">
      <style:text-properties style:font-name="Times New Roman" style:font-name-complex="Times New Roman" fo:font-size="10.5pt" style:font-size-asian="10.5pt" style:font-size-complex="10.5pt" fo:language="pl" fo:country="PL"/>
    </style:style>
    <style:style style:name="FirstChar" style:display-name="First Char" style:family="text" style:parent-style-name="TextChar">
      <style:text-properties style:font-name="Times New Roman" style:font-name-complex="Times New Roman" fo:font-weight="bold" style:font-weight-asian="bold" fo:font-size="14pt" style:font-size-asian="14pt" style:font-size-complex="10.5pt" fo:language="pl" fo:country="PL"/>
    </style:style>
    <style:style style:name="SecondChar" style:display-name="Second Char" style:family="text" style:parent-style-name="TextChar">
      <style:text-properties style:font-name="Times New Roman" style:font-name-complex="Times New Roman" fo:font-weight="bold" style:font-weight-asian="bold" fo:font-style="italic" style:font-style-asian="italic" fo:font-size="10.5pt" style:font-size-asian="10.5pt" style:font-size-complex="10.5pt" fo:language="pl" fo:country="PL"/>
    </style:style>
    <style:style style:name="Literature" style:display-name="Literature" style:family="paragraph" style:parent-style-name="First" style:list-style-name="LFO3" style:default-outline-level="1">
      <style:paragraph-properties fo:margin-top="0in" fo:margin-bottom="0in"/>
      <style:text-properties fo:font-weight="normal" style:font-weight-asian="normal" fo:font-size="12pt" style:font-size-asian="12pt" fo:hyphenate="false"/>
    </style:style>
    <style:style style:name="LiteratureChar" style:display-name="Literature Char" style:family="text" style:parent-style-name="FirstChar">
      <style:text-properties style:font-name="Times New Roman" style:font-name-complex="Times New Roman" fo:font-weight="normal" style:font-weight-asian="normal" fo:font-size="10pt" style:font-size-asian="10pt" style:font-size-complex="10.5pt" fo:language="pl" fo:country="PL"/>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 style:display-name="Table" style:family="paragraph">
      <style:paragraph-properties fo:keep-with-next="always" fo:line-height="100%"/>
      <style:text-properties style:font-name="Times New Roman" fo:font-weight="bold" style:font-weight-asian="bold" fo:font-style="italic" style:font-style-asian="italic" fo:font-size="9pt" style:font-size-asian="9pt" style:font-size-complex="10.5pt" fo:hyphenate="false"/>
    </style:style>
    <style:style style:name="TableChar" style:display-name="Table Char" style:family="text" style:parent-style-name="TextChar">
      <style:text-properties style:font-name="Times New Roman" style:font-name-complex="Times New Roman" fo:font-weight="bold" style:font-weight-asian="bold" fo:font-style="italic" style:font-style-asian="italic" fo:font-size="9pt" style:font-size-asian="9pt" style:font-size-complex="10.5pt" fo:language="pl" fo:country="PL"/>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pl" fo:country="PL"/>
    </style:style>
    <style:style style:name="FootnoteReference" style:display-name="Footnote Reference" style:family="text" style:parent-style-name="DefaultParagraphFont">
      <style:text-properties style:text-position="super 58.3%"/>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fo:language="pl" fo:country="PL"/>
    </style:style>
    <style:style style:name="EndnoteReference" style:display-name="Endnote Reference" style:family="text" style:parent-style-name="DefaultParagraphFont">
      <style:text-properties style:text-position="super 58.3%"/>
    </style:style>
    <style:style style:name="footnotedescription" style:display-name="footnote description" style:family="paragraph" style:next-style-name="Normal">
      <style:paragraph-properties fo:margin-bottom="0in" fo:line-height="101%"/>
      <style:text-properties style:font-name="Calibri" style:font-name-asian="Calibri" style:font-name-complex="Calibri" fo:color="#000000" fo:font-size="10pt" style:font-size-asian="10pt" fo:hyphenate="false"/>
    </style:style>
    <style:style style:name="footnotedescriptionChar" style:display-name="footnote description Char" style:family="text">
      <style:text-properties style:font-name="Calibri" style:font-name-asian="Calibri" style:font-name-complex="Calibri" fo:color="#000000" fo:font-size="10pt" style:font-size-asian="10pt"/>
    </style:style>
    <style:style style:name="Index1" style:display-name="Index 1" style:family="paragraph" style:parent-style-name="Normal" style:next-style-name="Normal" style:auto-update="true">
      <style:paragraph-properties fo:margin-bottom="0in" fo:margin-left="0.1666in" fo:text-indent="-0.1666in">
        <style:tab-stops/>
      </style:paragraph-properties>
      <style:text-properties fo:font-size="9pt" style:font-size-asian="9pt" style:font-size-complex="9pt" fo:hyphenate="false"/>
    </style:style>
    <style:style style:name="Index2" style:display-name="Index 2" style:family="paragraph" style:parent-style-name="Normal" style:next-style-name="Normal" style:auto-update="true">
      <style:paragraph-properties fo:margin-bottom="0in" fo:margin-left="0.3333in" fo:text-indent="-0.1666in">
        <style:tab-stops/>
      </style:paragraph-properties>
      <style:text-properties fo:font-size="9pt" style:font-size-asian="9pt" style:font-size-complex="9pt" fo:hyphenate="false"/>
    </style:style>
    <style:style style:name="Index3" style:display-name="Index 3" style:family="paragraph" style:parent-style-name="Normal" style:next-style-name="Normal" style:auto-update="true">
      <style:paragraph-properties fo:margin-bottom="0in" fo:margin-left="0.5in" fo:text-indent="-0.1666in">
        <style:tab-stops/>
      </style:paragraph-properties>
      <style:text-properties fo:font-size="9pt" style:font-size-asian="9pt" style:font-size-complex="9pt" fo:hyphenate="false"/>
    </style:style>
    <style:style style:name="Index4" style:display-name="Index 4" style:family="paragraph" style:parent-style-name="Normal" style:next-style-name="Normal" style:auto-update="true">
      <style:paragraph-properties fo:margin-bottom="0in" fo:margin-left="0.6666in" fo:text-indent="-0.1666in">
        <style:tab-stops/>
      </style:paragraph-properties>
      <style:text-properties fo:font-size="9pt" style:font-size-asian="9pt" style:font-size-complex="9pt" fo:hyphenate="false"/>
    </style:style>
    <style:style style:name="Index5" style:display-name="Index 5" style:family="paragraph" style:parent-style-name="Normal" style:next-style-name="Normal" style:auto-update="true">
      <style:paragraph-properties fo:margin-bottom="0in" fo:margin-left="0.8333in" fo:text-indent="-0.1666in">
        <style:tab-stops/>
      </style:paragraph-properties>
      <style:text-properties fo:font-size="9pt" style:font-size-asian="9pt" style:font-size-complex="9pt" fo:hyphenate="false"/>
    </style:style>
    <style:style style:name="Index6" style:display-name="Index 6" style:family="paragraph" style:parent-style-name="Normal" style:next-style-name="Normal" style:auto-update="true">
      <style:paragraph-properties fo:margin-bottom="0in" fo:margin-left="1in" fo:text-indent="-0.1666in">
        <style:tab-stops/>
      </style:paragraph-properties>
      <style:text-properties fo:font-size="9pt" style:font-size-asian="9pt" style:font-size-complex="9pt" fo:hyphenate="false"/>
    </style:style>
    <style:style style:name="Index7" style:display-name="Index 7" style:family="paragraph" style:parent-style-name="Normal" style:next-style-name="Normal" style:auto-update="true">
      <style:paragraph-properties fo:margin-bottom="0in" fo:margin-left="1.1666in" fo:text-indent="-0.1666in">
        <style:tab-stops/>
      </style:paragraph-properties>
      <style:text-properties fo:font-size="9pt" style:font-size-asian="9pt" style:font-size-complex="9pt" fo:hyphenate="false"/>
    </style:style>
    <style:style style:name="Index8" style:display-name="Index 8" style:family="paragraph" style:parent-style-name="Normal" style:next-style-name="Normal" style:auto-update="true">
      <style:paragraph-properties fo:margin-bottom="0in" fo:margin-left="1.3333in" fo:text-indent="-0.1666in">
        <style:tab-stops/>
      </style:paragraph-properties>
      <style:text-properties fo:font-size="9pt" style:font-size-asian="9pt" style:font-size-complex="9pt" fo:hyphenate="false"/>
    </style:style>
    <style:style style:name="Index9" style:display-name="Index 9" style:family="paragraph" style:parent-style-name="Normal" style:next-style-name="Normal" style:auto-update="true">
      <style:paragraph-properties fo:margin-bottom="0in" fo:margin-left="1.5in" fo:text-indent="-0.1666in">
        <style:tab-stops/>
      </style:paragraph-properties>
      <style:text-properties fo:font-size="9pt" style:font-size-asian="9pt" style:font-size-complex="9pt" fo:hyphenate="false"/>
    </style:style>
    <style:style style:name="IndexHeading" style:display-name="Index Heading" style:family="paragraph" style:parent-style-name="Normal" style:next-style-name="Index1">
      <style:paragraph-properties fo:text-align="center" fo:margin-top="0.1666in" fo:margin-bottom="0.0833in"/>
      <style:text-properties fo:font-weight="bold" style:font-weight-asian="bold" style:font-weight-complex="bold" fo:font-size="13pt" style:font-size-asian="13pt" style:font-size-complex="13pt" fo:hyphenate="false"/>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language="en" fo:country="US" fo:hyphenate="false"/>
    </style:style>
    <style:style style:name="TableofFigures" style:display-name="Table of Figures" style:family="paragraph" style:parent-style-name="Normal" style:next-style-name="Normal">
      <style:paragraph-properties fo:margin-bottom="0in" fo:margin-left="0.3333in" fo:text-indent="-0.3333in">
        <style:tab-stops/>
      </style:paragraph-properties>
      <style:text-properties style:font-name="Times New Roman" fo:font-variant="small-caps" style:font-size-complex="10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Times New Roman"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Times New Roman" fo:hyphenate="false"/>
    </style:style>
    <style:style style:name="Paveikslėliai" style:display-name="Paveikslėliai" style:family="paragraph" style:parent-style-name="Caption">
      <style:paragraph-properties fo:text-align="center"/>
      <style:text-properties style:font-name="Times New Roman" fo:font-size="10pt" style:font-size-asian="10pt" fo:hyphenate="false"/>
    </style:style>
    <style:style style:name="CaptionChar" style:display-name="Caption Char" style:family="text" style:parent-style-name="DefaultParagraphFont">
      <style:text-properties fo:font-style="italic" style:font-style-asian="italic" style:font-style-complex="italic" fo:color="#0E2841" fo:font-size="9pt" style:font-size-asian="9pt" style:font-size-complex="9pt" fo:language="pl" fo:country="PL"/>
    </style:style>
    <style:style style:name="PaveikslėliaiChar" style:display-name="Paveikslėliai Char" style:family="text" style:parent-style-name="CaptionChar">
      <style:text-properties style:font-name="Times New Roman" fo:font-style="italic" style:font-style-asian="italic" style:font-style-complex="italic" fo:color="#0E2841" fo:font-size="10pt" style:font-size-asian="10pt" style:font-size-complex="9pt" fo:language="pl" fo:country="PL"/>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suffix="." style:num-list-format-name="NLF0" style:num-format="1">
        <style:list-level-properties text:space-before="0.3937in" text:min-label-width="0.6083in" text:list-level-position-and-space-mode="label-alignment">
          <style:list-level-label-alignment text:label-followed-by="listtab" fo:margin-left="1.002in" fo:text-indent="-0.6083in"/>
        </style:list-level-properties>
      </text:list-level-style-number>
      <text:list-level-style-number text:level="2" style:num-list-format-name="NLF0" style:num-format="1" text:display-levels="2">
        <style:list-level-properties text:space-before="0.3937in" text:min-label-width="0.6062in" text:list-level-position-and-space-mode="label-alignment">
          <style:list-level-label-alignment text:label-followed-by="listtab" fo:margin-left="1in" fo:text-indent="-0.6062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prefix="["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2">
      <text:outline-level-style text:level="1" style:num-suffix="." style:num-list-format-name="NLF2" style:num-format="1">
        <style:list-level-properties text:space-before="0.3937in" text:min-label-width="0.6083in" text:list-level-position-and-space-mode="label-alignment">
          <style:list-level-label-alignment text:label-followed-by="listtab" fo:margin-left="1.002in" fo:text-indent="-0.6083in"/>
        </style:list-level-properties>
      </text:outline-level-style>
      <text:outline-level-style text:level="2" style:num-list-format-name="NLF2" style:num-format="1" text:display-levels="2">
        <style:list-level-properties text:space-before="0.3937in" text:min-label-width="0.6062in" text:list-level-position-and-space-mode="label-alignment">
          <style:list-level-label-alignment text:label-followed-by="listtab" fo:margin-left="1in" fo:text-indent="-0.6062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fo:language="en" fo:country="US"/>
    </style:style>
    <style:style style:name="T3" style:parent-style-name="DefaultParagraphFont" style:family="text">
      <style:text-properties fo:font-style="italic" style:font-style-asian="italic" style:font-style-complex="italic" fo:language="en" fo:country="US"/>
    </style:style>
    <style:style style:name="T4" style:parent-style-name="DefaultParagraphFont" style:family="text">
      <style:text-properties fo:font-style="italic" style:font-style-asian="italic" style:font-style-complex="italic" fo:language="lt" fo:country="LT"/>
    </style:style>
    <style:style style:name="P5" style:parent-style-name="Footer" style:family="paragraph">
      <style:paragraph-properties fo:text-align="end"/>
    </style:style>
    <style:style style:family="text" style:name="a6">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2">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3">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F0" style:page-layout-name="PL0">
      <style:header>
        <text:p text:style-name="Header"><draw:custom-shape svg:width="8.14653in" svg:height="1.01806in" draw:z-index="251661312" draw:id="id0" draw:style-name="a2" draw:transform="translate(-4.07326in -0.50903in) rotate(0.7854) translate(3.07326in 0.01736in)" draw:name="PowerPlusWaterMarkObject658169361" text:anchor-type="paragraph"><svg:title/><svg:desc/><text:p text:style-name="a1" text:class-names="" text:cond-style-name=""><text:span text:style-name="a0" text:class-names="">Tadeuš Žukovskij</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UwB</text:span></text:p>
      </style:header>
      <style:header-left>
        <text:p text:style-name="Header"><draw:custom-shape svg:width="8.14653in" svg:height="1.01806in" draw:z-index="251659264" draw:id="id1" draw:style-name="a5" draw:transform="translate(-4.07326in -0.50903in) rotate(0.7854) translate(3.07326in 0.01736in)" draw:name="PowerPlusWaterMarkObject658169360" text:anchor-type="paragraph"><svg:title/><svg:desc/><text:p text:style-name="a4" text:class-names="" text:cond-style-name=""><text:span text:style-name="a3" text:class-names="">Tadeuš Žukovskij</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3">T</text:span><text:span text:style-name="T4">Ž</text:span></text:p>
      </style:header-left>
      <style:footer>
        <text:p text:style-name="Footer"><text:page-number text:fixed="false">2</text:page-number></text:p>
      </style:footer>
      <style:footer-left>
        <text:p text:style-name="P5"><text:page-number text:fixed="false">2</text:page-number></text:p>
        <text:p text:style-name="Footer"/>
      </style:footer-left>
      <style:header-first>
        <text:p text:style-name="Header"><draw:custom-shape svg:width="8.14653in" svg:height="1.01806in" draw:z-index="251663360" draw:id="id2" draw:style-name="a8" draw:transform="translate(-4.07326in -0.50903in) rotate(0.7854) translate(4.07326in 0.50903in)" draw:name="PowerPlusWaterMarkObject658169359" text:anchor-type="paragraph"><svg:title/><svg:desc/><text:p text:style-name="a7" text:class-names="" text:cond-style-name=""><text:span text:style-name="a6" text:class-names="">Tadeuš Žukovskij</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first>
      <style:footer-first>
        <text:p text:style-name="Footer"><text:page-number text:fixed="false">2</text:page-number></text:p>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ukovskij Tadeuš</meta:initial-creator>
    <dc:creator>Žukovskij Tadeuš</dc:creator>
    <meta:creation-date>2026-03-11T09:30:00Z</meta:creation-date>
    <dc:date>2026-03-20T08:26:00Z</dc:date>
    <meta:template xlink:href="Normal.dotm" xlink:type="simple"/>
    <meta:editing-cycles>3</meta:editing-cycles>
    <meta:editing-duration>PT38400S</meta:editing-duration>
    <meta:document-statistic meta:page-count="9" meta:paragraph-count="32" meta:word-count="2418" meta:character-count="16170" meta:row-count="114" meta:non-whitespace-character-count="13784"/>
  </office:meta>
</office:document-meta>
</file>